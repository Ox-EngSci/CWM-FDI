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D000000E408114E4F.png" manifest:media-type="image/png"/>
  <manifest:file-entry manifest:full-path="Pictures/100000010000033D0000014C7D694F15.png" manifest:media-type="image/png"/>
  <manifest:file-entry manifest:full-path="Pictures/10000001000003160000021C52314D84.png" manifest:media-type="image/png"/>
  <manifest:file-entry manifest:full-path="Pictures/100000010000008D000000E4D2F0F2AB.png" manifest:media-type="image/png"/>
  <manifest:file-entry manifest:full-path="Pictures/10000001000003160000021C8E9BBC4D.png" manifest:media-type="image/png"/>
  <manifest:file-entry manifest:full-path="Pictures/10000001000003160000021C980468CE.png" manifest:media-type="image/png"/>
  <manifest:file-entry manifest:full-path="Pictures/1000000100000547000000F1BD301B8C.png" manifest:media-type="image/png"/>
  <manifest:file-entry manifest:full-path="Pictures/100000010000008D000000E488082579.png" manifest:media-type="image/png"/>
  <manifest:file-entry manifest:full-path="Pictures/1000000100000331000001A5DA2A30AF.png" manifest:media-type="image/png"/>
  <manifest:file-entry manifest:full-path="Pictures/10000001000003F00000010D0BA2283D.png" manifest:media-type="image/png"/>
  <manifest:file-entry manifest:full-path="Pictures/10000001000003F00000010D9EF5CE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4451in" table:align="left"/>
    </style:style>
    <style:style style:name="Table1.A" style:family="table-column">
      <style:table-column-properties style:column-width="3.1431in"/>
    </style:style>
    <style:style style:name="Table1.B" style:family="table-column">
      <style:table-column-properties style:column-width="2.3021in"/>
    </style:style>
    <style:style style:name="Table1.A1" style:family="table-cell">
      <style:table-cell-properties style:vertical-align="middle" fo:padding="0.0194in" fo:border="none"/>
    </style:style>
    <style:style style:name="P1" style:family="paragraph" style:parent-style-name="Standard">
      <style:text-properties fo:font-weight="bold" officeooo:rsid="0006bbf3" officeooo:paragraph-rsid="0006bbf3" style:font-weight-asian="bold" style:font-weight-complex="bold"/>
    </style:style>
    <style:style style:name="P2" style:family="paragraph" style:parent-style-name="Standard">
      <style:text-properties fo:font-weight="bold" officeooo:rsid="000702f8" officeooo:paragraph-rsid="000702f8" style:font-weight-asian="bold" style:font-weight-complex="bold"/>
    </style:style>
    <style:style style:name="P3" style:family="paragraph" style:parent-style-name="Standard">
      <style:text-properties fo:font-weight="bold" officeooo:rsid="00085a38" officeooo:paragraph-rsid="00085a38" style:font-weight-asian="bold" style:font-weight-complex="bold"/>
    </style:style>
    <style:style style:name="P4" style:family="paragraph" style:parent-style-name="Standard">
      <style:text-properties fo:font-weight="bold" officeooo:rsid="00085a38" officeooo:paragraph-rsid="00095ad0" style:font-weight-asian="bold" style:font-weight-complex="bold"/>
    </style:style>
    <style:style style:name="P5" style:family="paragraph" style:parent-style-name="Standard">
      <style:text-properties fo:font-weight="bold" officeooo:rsid="00095ad0" officeooo:paragraph-rsid="00095ad0" style:font-weight-asian="bold" style:font-weight-complex="bold"/>
    </style:style>
    <style:style style:name="P6" style:family="paragraph" style:parent-style-name="Standard">
      <style:text-properties fo:font-weight="bold" officeooo:rsid="000a631c" officeooo:paragraph-rsid="000a631c" style:font-weight-asian="bold" style:font-weight-complex="bold"/>
    </style:style>
    <style:style style:name="P7" style:family="paragraph" style:parent-style-name="Standard">
      <style:text-properties fo:font-weight="bold" officeooo:rsid="000b4829" officeooo:paragraph-rsid="000b4829" style:font-weight-asian="bold" style:font-weight-complex="bold"/>
    </style:style>
    <style:style style:name="P8" style:family="paragraph" style:parent-style-name="Standard">
      <style:text-properties fo:font-weight="bold" officeooo:rsid="000d109b" officeooo:paragraph-rsid="000d109b" style:font-weight-asian="bold" style:font-weight-complex="bold"/>
    </style:style>
    <style:style style:name="P9" style:family="paragraph" style:parent-style-name="Standard">
      <style:text-properties fo:font-weight="bold" officeooo:rsid="000dfc6b" officeooo:paragraph-rsid="000dfc6b" style:font-weight-asian="bold" style:font-weight-complex="bold"/>
    </style:style>
    <style:style style:name="P10" style:family="paragraph" style:parent-style-name="Standard">
      <style:text-properties fo:font-weight="bold" officeooo:rsid="000eccd8" officeooo:paragraph-rsid="000eccd8" style:font-weight-asian="bold" style:font-weight-complex="bold"/>
    </style:style>
    <style:style style:name="P11" style:family="paragraph" style:parent-style-name="Standard">
      <style:text-properties fo:font-weight="normal" officeooo:rsid="0006bbf3" officeooo:paragraph-rsid="0006bbf3" style:font-weight-asian="normal" style:font-weight-complex="normal"/>
    </style:style>
    <style:style style:name="P12" style:family="paragraph" style:parent-style-name="Standard">
      <style:text-properties fo:font-weight="normal" officeooo:rsid="0006bbf3" officeooo:paragraph-rsid="000702f8" style:font-weight-asian="normal" style:font-weight-complex="normal"/>
    </style:style>
    <style:style style:name="P13" style:family="paragraph" style:parent-style-name="Standard">
      <style:text-properties fo:font-weight="normal" officeooo:rsid="000702f8" officeooo:paragraph-rsid="000702f8" style:font-weight-asian="normal" style:font-weight-complex="normal"/>
    </style:style>
    <style:style style:name="P14" style:family="paragraph" style:parent-style-name="Standard">
      <style:text-properties fo:font-weight="normal" officeooo:rsid="00085a38" officeooo:paragraph-rsid="00085a38" style:font-weight-asian="normal" style:font-weight-complex="normal"/>
    </style:style>
    <style:style style:name="P15" style:family="paragraph" style:parent-style-name="Standard">
      <style:text-properties fo:font-weight="normal" officeooo:rsid="00095ad0" officeooo:paragraph-rsid="00095ad0" style:font-weight-asian="normal" style:font-weight-complex="normal"/>
    </style:style>
    <style:style style:name="P16" style:family="paragraph" style:parent-style-name="Standard">
      <style:text-properties fo:font-weight="normal" officeooo:rsid="000a631c" officeooo:paragraph-rsid="000a631c" style:font-weight-asian="normal" style:font-weight-complex="normal"/>
    </style:style>
    <style:style style:name="P17" style:family="paragraph" style:parent-style-name="Standard">
      <style:text-properties fo:font-weight="normal" officeooo:rsid="000b4829" officeooo:paragraph-rsid="000b4829" style:font-weight-asian="normal" style:font-weight-complex="normal"/>
    </style:style>
    <style:style style:name="P18" style:family="paragraph" style:parent-style-name="Standard">
      <style:text-properties fo:font-weight="normal" officeooo:rsid="000d109b" officeooo:paragraph-rsid="000d109b" style:font-weight-asian="normal" style:font-weight-complex="normal"/>
    </style:style>
    <style:style style:name="P19" style:family="paragraph" style:parent-style-name="Standard">
      <style:text-properties fo:font-weight="normal" officeooo:rsid="000dfc6b" officeooo:paragraph-rsid="000dfc6b" style:font-weight-asian="normal" style:font-weight-complex="normal"/>
    </style:style>
    <style:style style:name="P20" style:family="paragraph" style:parent-style-name="Standard">
      <style:text-properties fo:font-weight="normal" officeooo:rsid="000eccd8" officeooo:paragraph-rsid="000eccd8" style:font-weight-asian="normal" style:font-weight-complex="normal"/>
    </style:style>
    <style:style style:name="P21" style:family="paragraph" style:parent-style-name="Standard">
      <style:text-properties fo:font-weight="normal" officeooo:rsid="001133f6" officeooo:paragraph-rsid="001133f6" style:font-weight-asian="normal" style:font-weight-complex="normal"/>
    </style:style>
    <style:style style:name="P22" style:family="paragraph" style:parent-style-name="Standard">
      <style:text-properties fo:font-weight="normal" officeooo:rsid="0012cbee" officeooo:paragraph-rsid="0012cbee"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085a38"/>
    </style:style>
    <style:style style:name="T3" style:family="text">
      <style:text-properties officeooo:rsid="00095ad0"/>
    </style:style>
    <style:style style:name="T4" style:family="text">
      <style:text-properties officeooo:rsid="001210c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3.6626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3</text:p>
      <text:p text:style-name="P1">Question 1</text:p>
      <text:p text:style-name="P11"><draw:frame draw:style-name="fr2" draw:name="Image1" text:anchor-type="char" svg:width="6.6929in" svg:height="1.7862in" draw:z-index="0"><draw:image xlink:href="Pictures/10000001000003F00000010D9EF5CEB9.png" xlink:type="simple" xlink:show="embed" xlink:actuate="onLoad" draw:mime-type="image/png"/></draw:frame><draw:frame draw:style-name="fr1" draw:name="Image2" text:anchor-type="char" svg:x="0in" svg:y="1.978in" svg:width="6.6929in" svg:height="1.7862in" draw:z-index="1"><draw:image xlink:href="Pictures/10000001000003F00000010D0BA2283D.png" xlink:type="simple" xlink:show="embed" xlink:actuate="onLoad" draw:mime-type="image/png"/></draw:frame>Terminal is the highest user of CPU at the moment.</text:p>
      <text:p text:style-name="P11">Firefox is the higheset memory user</text:p>
      <text:p text:style-name="P11"/>
      <text:p text:style-name="P11">For CPU, I could run a computationally expensive program locally, while for memory, I could run a program that requires a lot of dynamic memory. These are both achievable by playing a locally run, high performance game, like Minecraft.</text:p>
      <text:p text:style-name="P11"/>
      <text:p text:style-name="P1">Question 2</text:p>
      <text:p text:style-name="P1"><text:span text:style-name="T1">CPU utilisation seems to be at about 5%, and therefore it should be idle about 95% of the time.</text:span></text:p>
      <text:p text:style-name="P1"><text:span text:style-name="T1"/></text:p>
      <text:p text:style-name="P1">Question 3</text:p>
      <text:p text:style-name="P13">Yes there are some minor fluctuations that occur over time. This is possibly because of background processes (e.g. memory allocation activities) turning on and off which are considered part of baseline.</text:p>
      <text:p text:style-name="P13"/>
      <text:p text:style-name="P2">Question 4</text:p>
      <text:p text:style-name="P12"/>
      <text:p text:style-name="P13">Note that the columns at the top correspond to:</text:p>
      <text:p text:style-name="P13">usy%,Bzy_MHz,PkgWatt,CorWatt,PkgTmp,CoreTmp</text:p>
      <text:p text:style-name="P13"><draw:frame draw:style-name="fr5" draw:name="Image3" text:anchor-type="char" svg:x="0.1327in" svg:y="0.102in" svg:width="2.6866in" svg:height="2.4307in" draw:z-index="2"><draw:image xlink:href="Pictures/1000000100000331000001A5DA2A30AF.png" xlink:type="simple" xlink:show="embed" xlink:actuate="onLoad" draw:mime-type="image/png"/></draw:frame></text:p>
      <text:p text:style-name="P13"><text:s/><text:span text:style-name="T2">The busy percentage is much higher than the previously measured one using htop. This tool therefore probably grants more insights into the nature of fluctuations of baseline CPU use, and actual absolute values of baseline CPU use over time. This is in contrast to the previous one which only measured and displayed CPU use in a single instant at any point in time.</text:span></text:p>
      <text:p text:style-name="P13"/>
      <text:p text:style-name="P13"/>
      <text:p text:style-name="P13"/>
      <text:p text:style-name="P13"/>
      <text:p text:style-name="P13"/>
      <text:p text:style-name="P3"><text:soft-page-break/>Question 5</text:p>
      <text:p text:style-name="P14">Output:</text:p>
      <text:p text:style-name="P14">LHS: Pkg%pc2,Pkg%pc3,Pkg%pc6,Pkg%pc7,Pkg%pc8,CPU%c1,CPU%c3,CPU%c6,CPU%c7</text:p>
      <text:p text:style-name="P14">RHS: usy%,Bzy_MHz,PkgWatt,CorWatt,PkgTmp,CoreTmp</text:p>
      <text:p text:style-name="P14"/>
      <text:p text:style-name="P3"><draw:frame draw:style-name="fr2" draw:name="Image4" text:anchor-type="char" svg:width="6.6929in" svg:height="1.1937in" draw:z-index="3"><draw:image xlink:href="Pictures/1000000100000547000000F1BD301B8C.png" xlink:type="simple" xlink:show="embed" xlink:actuate="onLoad" draw:mime-type="image/png"/></draw:frame></text:p>
      <text:p text:style-name="P4"><text:span text:style-name="T3">Q</text:span>uestion 6</text:p>
      <text:p text:style-name="P5"><draw:frame draw:style-name="fr3" draw:name="Image5" text:anchor-type="char" svg:width="4.6752in" svg:height="3.1957in" draw:z-index="4"><draw:image xlink:href="Pictures/10000001000003160000021C980468C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Baseline energy is small but non-negligible relative to that consumed during stress testing. However, since they are non-negligible, if the lab machines sit idle for most of the day, overall energy efficiency is likely to be adversely impacted, since energy will be consumed for no good reason.</text:p>
      <text:p text:style-name="P15"/>
      <text:p text:style-name="P5">Question 7</text:p>
      <text:p text:style-name="P16">For matmul_slow.py:</text:p>
      <text:p text:style-name="P16"><draw:frame draw:style-name="fr4" draw:name="Image6" text:anchor-type="char" svg:width="4.6772in" svg:height="3.1972in" draw:z-index="5"><draw:image xlink:href="Pictures/10000001000003160000021C8E9BBC4D.png" xlink:type="simple" xlink:show="embed" xlink:actuate="onLoad" draw:mime-type="image/png"/></draw:frame><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for matmul_fast.py:</text:p>
      <text:p text:style-name="P16"><draw:frame draw:style-name="fr3" draw:name="Image7" text:anchor-type="char" svg:width="4.4874in" svg:height="3.0673in" draw:z-index="6"><draw:image xlink:href="Pictures/10000001000003160000021C52314D84.png" xlink:type="simple" xlink:show="embed" xlink:actuate="onLoad" draw:mime-type="image/png"/></draw:frame><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Note that the code for matmul_fast.py has been modified for testing of all 3 matmul_fast algorithms, leading to the seemingly longer program runtime.</text:p>
      <text:p text:style-name="P16"/>
      <text:p text:style-name="P16">The fast version led to mildly higher energy efficiency, as although it took slightly more power to run, it ran for much less time. This sort of matched my intuition as I had expected it to do so, as the underlying actions within the program itself were not significantly more complex than those in matmul_slow, and previous experiments had shown that matmul_fast was significantly faster than matmul_slow.</text:p>
      <text:p text:style-name="P16"/>
      <text:p text:style-name="P6">Question 8</text:p>
      <text:p text:style-name="P7"><text:span text:style-name="T1">No. Deeper sleep states might take longer to awaken, which may be problematic for operations where system reaction times are important, like those governing defence or energy systems.</text:span></text:p>
      <text:p text:style-name="P7"><text:span text:style-name="T1"/></text:p>
      <text:p text:style-name="P7">Question 9</text:p>
      <text:p text:style-name="P7"><text:span text:style-name="T1">If seeking to maximise utilisation, data centres might be incentivised to scale down a little, as long as their core offerings are not too significantly impacted. They might alternatively be designed to allow for a variety of sleep states, to enable optimal utilisation and power consumption while providing quick starts to clients. </text:span></text:p>
      <text:p text:style-name="P7"><text:span text:style-name="T1"/></text:p>
      <text:p text:style-name="P7"><text:span text:style-name="T1">Thermals probably limit scale, while design probably caps this, leading to incentives for superior thermal management, or roll-outs in locations where this can be more easily achieved (e.g. where cooling costs are lower, like colder regions).</text:span></text:p>
      <text:p text:style-name="P7"><text:span text:style-name="T1"/></text:p>
      <text:p text:style-name="P7">Question 10</text:p>
      <text:p text:style-name="P17">a. 8 seconds (1 byte=8 bits)</text:p>
      <text:p text:style-name="P17">b. 2.4J to 80J</text:p>
      <text:p text:style-name="P17">c. Each machine probably adds 2.4J to 80J in the best case. Transmission network costs would also add to this value, as would cache fetches, which would increase the total energy required for the first machine since it would have to spend energy retrieving the file before sending it. Furthermore, costs associated with route-finding would need to be added in the event that the network path is not perfectly direct and known to be so. Therefore, additional information relating to cache-retrieval, machine-machine transmission, and route-finding costs would be needed.</text:p>
      <text:p text:style-name="P17"/>
      <text:p text:style-name="P8">Question 11</text:p>
      <text:p text:style-name="P18"><draw:frame draw:style-name="fr2" draw:name="Image8" text:anchor-type="char" svg:width="6.6929in" svg:height="2.6799in" draw:z-index="7"><draw:image xlink:href="Pictures/100000010000033D0000014C7D694F15.png" xlink:type="simple" xlink:show="embed" xlink:actuate="onLoad" draw:mime-type="image/png"/></draw:frame><text:soft-page-break/><text:s/></text:p>
      <text:p text:style-name="P18">Highlighted cells are for PkgWatt and CoreWatt for when the file was being downloaded. The highlighted PkgWatt values add to 35.48J. They are similar, as this falls within previously mentioned range.</text:p>
      <text:p text:style-name="P18"/>
      <text:p text:style-name="P9">Question 12</text:p>
      <text:p text:style-name="P19">Power consumption for 144p, 480p, and 720p.</text:p>
      <text:p text:style-name="P17"><draw:frame draw:style-name="fr1" draw:name="Image9" text:anchor-type="char" svg:x="0.0917in" svg:y="0.1043in" svg:width="1.4689in" svg:height="2.3752in" draw:z-index="8"><draw:image xlink:href="Pictures/100000010000008D000000E408114E4F.png" xlink:type="simple" xlink:show="embed" xlink:actuate="onLoad" draw:mime-type="image/png"/></draw:frame><text:s/><draw:frame draw:style-name="fr1" draw:name="Image10" text:anchor-type="char" svg:x="1.852in" svg:y="0.148in" svg:width="1.4689in" svg:height="2.3752in" draw:z-index="9"><draw:image xlink:href="Pictures/100000010000008D000000E488082579.png" xlink:type="simple" xlink:show="embed" xlink:actuate="onLoad" draw:mime-type="image/png"/></draw:frame><draw:frame draw:style-name="fr1" draw:name="Image11" text:anchor-type="char" svg:x="3.6854in" svg:y="0.1398in" svg:width="1.4689in" svg:height="2.3752in" draw:z-index="10"><draw:image xlink:href="Pictures/100000010000008D000000E4D2F0F2A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text:p>
      <text:p text:style-name="P19">The first took 25.92J, the second 25.66, the third 27.68, with resolutions in the order mentioned above. Therefore, video streaming is quite energy efficient, since power consumed rose relatively little for an increase in resolution.</text:p>
      <text:p text:style-name="P19"/>
      <text:p text:style-name="P10">Question 13</text:p>
      <text:p text:style-name="P20">Using North Korea on 090626 at 1230, with 308gCO2/kWh, and </text:p>
      <text:p text:style-name="P20">Singapore on 080626 at 1515, with 494gCO2/kWh,</text:p>
      <text:p text:style-name="P20">since matmul_slow.py and matmul_fast.py took 197.9J and 152.9J respectively,</text:p>
      <text:p text:style-name="P20"/>
      <text:p text:style-name="P20">In North Korea the carbon footprints would be 0.0169gCO2 and 0.013gCO2 respectively, while</text:p>
      <text:p text:style-name="P20">in Singapore the carbon footprints would be 0.0272gCO2 and 0.0210gCO2 respectively. These are quite stark differences.</text:p>
      <text:p text:style-name="P20"/>
      <text:p text:style-name="P21">Savings at scale in any region <text:span text:style-name="T4">from program optimisations </text:span>are therefore probably incredibly significant, <text:span text:style-name="T4">especially for AI inference use cases. Since the code necessarily consumes large amounts of energy, it should be run in places with more renewable energy like the UK as opposed to </text:span><text:soft-page-break/><text:span text:style-name="T4">Singapore, at times when the share of renewables are highest like in the day when solar power is most abundant.</text:span></text:p>
      <text:p text:style-name="P20"/>
      <text:p text:style-name="P20"/>
      <text:p text:style-name="P10">Question 14</text:p>
      <text:p text:style-name="P22">Doing the math yields,</text:p>
      <text:p text:style-name="P22">per day: 0.85GWh</text:p>
      <text:p text:style-name="P22">per month: 25.5 Gwh</text:p>
      <text:p text:style-name="P22">per year: 310.25 Gwh (roughly 30 000 households in developed countries)</text:p>
      <text:p text:style-name="P22"/>
      <text:p text:style-name="P22">From ChatGPT, training costs are:</text:p>
      <table:table table:name="Table1" table:style-name="Table1">
        <table:table-column table:style-name="Table1.A"/>
        <table:table-column table:style-name="Table1.B"/>
        <table:table-header-rows>
          <table:table-row>
            <table:table-cell table:style-name="Table1.A1" office:value-type="string">
              <text:p text:style-name="Table_20_Heading">Model</text:p>
            </table:table-cell>
            <table:table-cell table:style-name="Table1.A1" office:value-type="string">
              <text:p text:style-name="Table_20_Heading">Estimated training energy</text:p>
            </table:table-cell>
          </table:table-row>
        </table:table-header-rows>
        <table:table-row>
          <table:table-cell table:style-name="Table1.A1" office:value-type="string">
            <text:p text:style-name="Table_20_Contents">GPT-3 (2020)</text:p>
          </table:table-cell>
          <table:table-cell table:style-name="Table1.A1" office:value-type="string">
            <text:p text:style-name="Table_20_Contents">~1–5 GWh</text:p>
          </table:table-cell>
        </table:table-row>
        <table:table-row>
          <table:table-cell table:style-name="Table1.A1" office:value-type="string">
            <text:p text:style-name="Table_20_Contents">GPT-4 (2023)</text:p>
          </table:table-cell>
          <table:table-cell table:style-name="Table1.A1" office:value-type="string">
            <text:p text:style-name="Table_20_Contents">~20–60 GWh</text:p>
          </table:table-cell>
        </table:table-row>
        <table:table-row>
          <table:table-cell table:style-name="Table1.A1" office:value-type="string">
            <text:p text:style-name="Table_20_Contents">Frontier models around GPT-4.5/GPT-5 scale</text:p>
          </table:table-cell>
          <table:table-cell table:style-name="Table1.A1" office:value-type="string">
            <text:p text:style-name="Table_20_Contents">~50–500+ GWh (very uncertain)</text:p>
          </table:table-cell>
        </table:table-row>
      </table:table>
      <text:p text:style-name="P22"/>
      <text:p text:style-name="P22"/>
      <text:p text:style-name="P22">From <text:a xlink:type="simple" xlink:href="https://www.cevalogistics.com/en/glossary/gigawatt-hour" text:style-name="Internet_20_link" text:visited-style-name="Visited_20_Internet_20_Link">https://www.cevalogistics.com/en/glossary/gigawatt-hour</text:a>, 1GWh powers 220 households for a year in a developed country, letting 1 Hy denote the power needed for 1 household a year,</text:p>
      <text:p text:style-name="P22"/>
      <text:p text:style-name="P22"/>
      <text:p text:style-name="P22">From <text:a xlink:type="simple" xlink:href="https://www.ema.gov.sg/resources/singapore-energy-statistics/chapter3" text:style-name="Internet_20_link" text:visited-style-name="Visited_20_Internet_20_Link">https://www.ema.gov.sg/resources/singapore-energy-statistics/chapter3</text:a></text:p>
      <text:p text:style-name="P22">Singapore consumed 58TWh in 2024. Letting 58TWh=1 SGPy,</text:p>
      <text:p text:style-name="P22"/>
      <text:p text:style-name="P22">ChatGPT footprint for inference becomes:</text:p>
      <text:p text:style-name="P22">per day: 187Hy</text:p>
      <text:p text:style-name="P22">per month: 5610Hy</text:p>
      <text:p text:style-name="P22">per year: 68255Hy</text:p>
      <text:p text:style-name="P22">while for training it becomes:</text:p>
      <text:p text:style-name="P22">GPT-3: 1100Hy</text:p>
      <text:p text:style-name="P22">GPT-4: 13200 Hy</text:p>
      <text:p text:style-name="P22">Frontier: 0.1SGPy</text:p>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9T10:49:40.514846026</meta:creation-date>
    <meta:generator>LibreOffice/24.2.7.2$Linux_X86_64 LibreOffice_project/420$Build-2</meta:generator>
    <dc:date>2026-06-09T12:55:01.759654982</dc:date>
    <meta:editing-duration>PT38M5S</meta:editing-duration>
    <meta:editing-cycles>7</meta:editing-cycles>
    <meta:document-statistic meta:table-count="1" meta:image-count="11" meta:object-count="0" meta:page-count="5" meta:paragraph-count="75" meta:word-count="874" meta:character-count="5657" meta:non-whitespace-character-count="4848"/>
  </office:meta>
</office:document-meta>
</file>