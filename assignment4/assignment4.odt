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403in" style:rel-column-width="779*"/>
    </style:style>
    <style:style style:name="Table1.B" style:family="table-column">
      <style:table-column-properties style:column-width="3.4979in" style:rel-column-width="5041*"/>
    </style:style>
    <style:style style:name="Table1.C" style:family="table-column">
      <style:table-column-properties style:column-width="2.6542in" style:rel-column-width="382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0.8535in" style:rel-column-width="1230*"/>
    </style:style>
    <style:style style:name="Table2.B" style:family="table-column">
      <style:table-column-properties style:column-width="3.1819in" style:rel-column-width="4585*"/>
    </style:style>
    <style:style style:name="Table2.C" style:family="table-column">
      <style:table-column-properties style:column-width="2.6576in" style:rel-column-width="3830*"/>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weight="bold" officeooo:rsid="00076c88" officeooo:paragraph-rsid="00076c88" style:font-weight-asian="bold" style:font-weight-complex="bold"/>
    </style:style>
    <style:style style:name="P2" style:family="paragraph" style:parent-style-name="Standard">
      <style:text-properties fo:font-weight="bold" officeooo:rsid="0008a146" officeooo:paragraph-rsid="0008a146" style:font-weight-asian="bold" style:font-weight-complex="bold"/>
    </style:style>
    <style:style style:name="P3" style:family="paragraph" style:parent-style-name="Standard">
      <style:text-properties fo:font-weight="bold" officeooo:rsid="0009c60d" officeooo:paragraph-rsid="0009c60d" style:font-weight-asian="bold" style:font-weight-complex="bold"/>
    </style:style>
    <style:style style:name="P4" style:family="paragraph" style:parent-style-name="Standard">
      <style:text-properties fo:font-weight="bold" officeooo:rsid="000aa823" officeooo:paragraph-rsid="000aa823" style:font-weight-asian="bold" style:font-weight-complex="bold"/>
    </style:style>
    <style:style style:name="P5" style:family="paragraph" style:parent-style-name="Standard">
      <style:text-properties fo:font-weight="bold" officeooo:rsid="000ab90f" officeooo:paragraph-rsid="000ab90f" style:font-weight-asian="bold" style:font-weight-complex="bold"/>
    </style:style>
    <style:style style:name="P6" style:family="paragraph" style:parent-style-name="Standard">
      <style:text-properties fo:font-weight="bold" officeooo:rsid="000bf835" officeooo:paragraph-rsid="000bf835" style:font-weight-asian="bold" style:font-weight-complex="bold"/>
    </style:style>
    <style:style style:name="P7" style:family="paragraph" style:parent-style-name="Standard">
      <style:text-properties fo:font-weight="bold" officeooo:rsid="000dd36e" officeooo:paragraph-rsid="000dd36e" style:font-weight-asian="bold" style:font-weight-complex="bold"/>
    </style:style>
    <style:style style:name="P8" style:family="paragraph" style:parent-style-name="Standard">
      <style:text-properties fo:font-weight="bold" officeooo:rsid="000e0c74" officeooo:paragraph-rsid="000e0c74" style:font-weight-asian="bold" style:font-weight-complex="bold"/>
    </style:style>
    <style:style style:name="P9" style:family="paragraph" style:parent-style-name="Standard">
      <style:text-properties fo:font-weight="normal" officeooo:rsid="0008a146" officeooo:paragraph-rsid="0008a146" style:font-weight-asian="normal" style:font-weight-complex="normal"/>
    </style:style>
    <style:style style:name="P10" style:family="paragraph" style:parent-style-name="Standard">
      <style:text-properties fo:font-weight="normal" officeooo:rsid="0009c60d" officeooo:paragraph-rsid="0009c60d" style:font-weight-asian="normal" style:font-weight-complex="normal"/>
    </style:style>
    <style:style style:name="P11" style:family="paragraph" style:parent-style-name="Standard">
      <style:text-properties fo:font-weight="normal" officeooo:rsid="000bf835" officeooo:paragraph-rsid="000ab90f" style:font-weight-asian="normal" style:font-weight-complex="normal"/>
    </style:style>
    <style:style style:name="P12" style:family="paragraph" style:parent-style-name="Standard">
      <style:text-properties fo:font-weight="normal" officeooo:rsid="000bf835" officeooo:paragraph-rsid="000bf835" style:font-weight-asian="normal" style:font-weight-complex="normal"/>
    </style:style>
    <style:style style:name="P13" style:family="paragraph" style:parent-style-name="Standard">
      <style:text-properties fo:font-weight="normal" officeooo:rsid="000c28c0" officeooo:paragraph-rsid="000c28c0" style:font-weight-asian="normal" style:font-weight-complex="normal"/>
    </style:style>
    <style:style style:name="P14" style:family="paragraph" style:parent-style-name="Standard">
      <style:text-properties fo:font-weight="normal" officeooo:rsid="000dd36e" officeooo:paragraph-rsid="000dd36e" style:font-weight-asian="normal" style:font-weight-complex="normal"/>
    </style:style>
    <style:style style:name="P15" style:family="paragraph" style:parent-style-name="Standard">
      <style:text-properties fo:font-weight="normal" officeooo:rsid="000e0c74" officeooo:paragraph-rsid="000e0c74" style:font-weight-asian="normal" style:font-weight-complex="normal"/>
    </style:style>
    <style:style style:name="P16" style:family="paragraph" style:parent-style-name="Table_20_Contents">
      <style:text-properties officeooo:rsid="0008a146" officeooo:paragraph-rsid="0008a146"/>
    </style:style>
    <style:style style:name="P17" style:family="paragraph" style:parent-style-name="Table_20_Contents">
      <style:text-properties officeooo:rsid="000ab90f" officeooo:paragraph-rsid="000ab90f"/>
    </style:style>
    <style:style style:name="T1" style:family="text">
      <style:text-properties officeooo:rsid="000aa823"/>
    </style:style>
    <style:style style:name="T2" style:family="text">
      <style:text-properties fo:font-weight="normal" style:font-weight-asian="normal" style:font-weight-complex="normal"/>
    </style:style>
    <style:style style:name="T3" style:family="text">
      <style:text-properties officeooo:rsid="000bf8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4</text:p>
      <text:p text:style-name="P2">Question 2</text:p>
      <text:p text:style-name="P9">Returns the address of a function pointer</text:p>
      <text:p text:style-name="P9"/>
      <text:p text:style-name="P2">Question 3</text:p>
      <table:table table:name="Table1" table:style-name="Table1">
        <table:table-column table:style-name="Table1.A"/>
        <table:table-column table:style-name="Table1.B"/>
        <table:table-column table:style-name="Table1.C"/>
        <table:table-row>
          <table:table-cell table:style-name="Table1.A1" office:value-type="string">
            <text:p text:style-name="P16">Offset</text:p>
          </table:table-cell>
          <table:table-cell table:style-name="Table1.A1" office:value-type="string">
            <text:p text:style-name="P16">Output</text:p>
          </table:table-cell>
          <table:table-cell table:style-name="Table1.C1" office:value-type="string">
            <text:p text:style-name="P16">Notes</text:p>
          </table:table-cell>
        </table:table-row>
        <table:table-row>
          <table:table-cell table:style-name="Table1.A2" office:value-type="string">
            <text:p text:style-name="P16">8</text:p>
          </table:table-cell>
          <table:table-cell table:style-name="Table1.A2" office:value-type="string">
            <text:p text:style-name="Table_20_Contents">Target Function Ptr: 0x4011dc</text:p>
          </table:table-cell>
          <table:table-cell table:style-name="Table1.C2" office:value-type="string">
            <text:p text:style-name="P16">Just a pointer</text:p>
          </table:table-cell>
        </table:table-row>
        <table:table-row>
          <table:table-cell table:style-name="Table1.A2" office:value-type="string">
            <text:p text:style-name="P16">24</text:p>
          </table:table-cell>
          <table:table-cell table:style-name="Table1.A2" office:value-type="string">
            <text:p text:style-name="Table_20_Contents">Target Function Ptr: 0x4011dc</text:p>
            <text:p text:style-name="Table_20_Contents">Success! Malicious function Called!</text:p>
            <text:p text:style-name="Table_20_Contents">Segmentation fault (core dumped)</text:p>
          </table:table-cell>
          <table:table-cell table:style-name="Table1.C2" office:value-type="string">
            <text:p text:style-name="P16">Somehow called a malicious function</text:p>
          </table:table-cell>
        </table:table-row>
        <table:table-row>
          <table:table-cell table:style-name="Table1.A2" office:value-type="string">
            <text:p text:style-name="P16">30</text:p>
          </table:table-cell>
          <table:table-cell table:style-name="Table1.A2" office:value-type="string">
            <text:p text:style-name="Table_20_Contents">Target Function Ptr: 0x4011dc</text:p>
            <text:p text:style-name="Table_20_Contents">Segmentation fault (core dumped)</text:p>
          </table:table-cell>
          <table:table-cell table:style-name="Table1.C2" office:value-type="string">
            <text:p text:style-name="P16">Went too far and hit kernel</text:p>
          </table:table-cell>
        </table:table-row>
        <table:table-row>
          <table:table-cell table:style-name="Table1.A2" office:value-type="string">
            <text:p text:style-name="P16">40</text:p>
          </table:table-cell>
          <table:table-cell table:style-name="Table1.A2" office:value-type="string">
            <text:p text:style-name="Table_20_Contents">Target Function Ptr: 0x4011dc</text:p>
            <text:p text:style-name="Table_20_Contents">Segmentation fault (core dumped)</text:p>
          </table:table-cell>
          <table:table-cell table:style-name="Table1.C2" office:value-type="string">
            <text:p text:style-name="P16">Went too far and hit kernel</text:p>
          </table:table-cell>
        </table:table-row>
        <table:table-row>
          <table:table-cell table:style-name="Table1.A2" office:value-type="string">
            <text:p text:style-name="P16">60</text:p>
          </table:table-cell>
          <table:table-cell table:style-name="Table1.A2" office:value-type="string">
            <text:p text:style-name="Table_20_Contents">Target Function Ptr: 0x4011dc</text:p>
            <text:p text:style-name="Table_20_Contents">Segmentation fault (core dumped)</text:p>
          </table:table-cell>
          <table:table-cell table:style-name="Table1.C2" office:value-type="string">
            <text:p text:style-name="P16">Went too far and hit kernel</text:p>
          </table:table-cell>
        </table:table-row>
      </table:table>
      <text:p text:style-name="P2"/>
      <text:p text:style-name="P3">Question 4</text:p>
      <text:p text:style-name="P10">buf only holds 16 b<text:span text:style-name="T1">ytes</text:span>. Therefore, an offset of 24 allows for the filling of these 16, and the full filling of the next <text:span text:style-name="T1">8 memory </text:span>byte<text:span text:style-name="T1">s</text:span>, which is also the saved RBP, since no local variables are saved/initialised.</text:p>
      <text:p text:style-name="P10"/>
      <text:p text:style-name="P4">Question 5</text:p>
      <text:p text:style-name="P4"><text:span text:style-name="T2">When the program is run with a small input less than 16 bytes, there are sufficient bytes in buf to store them. Therefore, the necessary number of bytes in buf are filled and that is that. However, when an excessive number of offset is used, the pointer tries to write to an address that is too far beyond buf and into non-editable territory, leading to the segmentation fault.</text:span></text:p>
      <text:p text:style-name="P4"><text:span text:style-name="T2"/></text:p>
      <text:p text:style-name="P5">Question 6</text:p>
      <table:table table:name="Table2" table:style-name="Table2">
        <table:table-column table:style-name="Table2.A"/>
        <table:table-column table:style-name="Table2.B"/>
        <table:table-column table:style-name="Table2.C"/>
        <table:table-row>
          <table:table-cell table:style-name="Table2.A1" office:value-type="string">
            <text:p text:style-name="P17">Buf offset</text:p>
          </table:table-cell>
          <table:table-cell table:style-name="Table2.A1" office:value-type="string">
            <text:p text:style-name="P17">Address</text:p>
          </table:table-cell>
          <table:table-cell table:style-name="Table2.C1" office:value-type="string">
            <text:p text:style-name="P17">Content</text:p>
          </table:table-cell>
        </table:table-row>
        <table:table-row>
          <table:table-cell table:style-name="Table2.A2" office:value-type="string">
            <text:p text:style-name="P17">0</text:p>
          </table:table-cell>
          <table:table-cell table:style-name="Table2.A2" office:value-type="string">
            <text:p text:style-name="P17">0x4011<text:span text:style-name="T3">DC</text:span></text:p>
          </table:table-cell>
          <table:table-cell table:style-name="Table2.C2" office:value-type="string">
            <text:p text:style-name="P17">ef</text:p>
          </table:table-cell>
        </table:table-row>
        <table:table-row>
          <table:table-cell table:style-name="Table2.A2" office:value-type="string">
            <text:p text:style-name="P17">1</text:p>
          </table:table-cell>
          <table:table-cell table:style-name="Table2.A2" office:value-type="string">
            <text:p text:style-name="P17">0x4011E4</text:p>
          </table:table-cell>
          <table:table-cell table:style-name="Table2.C2" office:value-type="string">
            <text:p text:style-name="P17">be</text:p>
          </table:table-cell>
        </table:table-row>
        <table:table-row>
          <table:table-cell table:style-name="Table2.A2" office:value-type="string">
            <text:p text:style-name="P17">2</text:p>
          </table:table-cell>
          <table:table-cell table:style-name="Table2.A2" office:value-type="string">
            <text:p text:style-name="P17">0x4011EC</text:p>
          </table:table-cell>
          <table:table-cell table:style-name="Table2.C2" office:value-type="string">
            <text:p text:style-name="P17">ad</text:p>
          </table:table-cell>
        </table:table-row>
        <table:table-row>
          <table:table-cell table:style-name="Table2.A2" office:value-type="string">
            <text:p text:style-name="P17">3</text:p>
          </table:table-cell>
          <table:table-cell table:style-name="Table2.A2" office:value-type="string">
            <text:p text:style-name="P17">0x4011F4</text:p>
          </table:table-cell>
          <table:table-cell table:style-name="Table2.C2" office:value-type="string">
            <text:p text:style-name="P17">de</text:p>
          </table:table-cell>
        </table:table-row>
      </table:table>
      <text:p text:style-name="P11"/>
      <text:p text:style-name="P6">Question 7</text:p>
      <text:p text:style-name="P12">It is so as it does not impose any limits on the length of the string it is copying, and is just blindly copying information, even if it inadvertently triggers buffer overflow issues.</text:p>
      <text:p text:style-name="P12"/>
      <text:p text:style-name="P12">strcat may be able to avoid this, as it concatenates inputs. It can therefore be used to allow for only the relevant inputs to be inputted, while concatenating any other buffer overflow attack characters.</text:p>
      <text:p text:style-name="P12"/>
      <text:p text:style-name="P6">Question 11</text:p>
      <text:p text:style-name="P13">Prompt for input of username and password do not reach segmentation fault.</text:p>
      <text:p text:style-name="P14">Prompts for name, department, system command, and response data are vulnerable to segmentation fault with sufficiently long responses. With long enough data inputs, the data is truncated and used <text:soft-page-break/>as the input for that field, and the excess data used for the next ones and so on. This enables determination of the number of characters expected by the program for the field.</text:p>
      <text:p text:style-name="P7"/>
      <text:p text:style-name="P7">Question 12</text:p>
      <text:p text:style-name="P15">An offset size of 264 causes a segfault.</text:p>
      <text:p text:style-name="P15"/>
      <text:p text:style-name="P8">Question 13</text:p>
      <text:p text:style-name="P15">It says win is at: <text:s text:c="2"/>0x401216</text:p>
      <text:p text:style-name="P15">It says main is at: 0x401679</text:p>
      <text:p text:style-name="P15">Running exploit.py with modified parameters yields:</text:p>
      <text:p text:style-name="P15">=====================================</text:p>
      <text:p text:style-name="P15"><text:s text:c="14"/>ACCESS GRANTED <text:s text:c="8"/></text:p>
      <text:p text:style-name="P15">=====================================</text:p>
      <text:p text:style-name="P15">FLAG: CTF{S3CURITY_CWM_WIN_2_EZ}</text:p>
      <text:p text:style-name="P15"/>
      <text:p text:style-name="P15">The offset used was 264, and target_address 0x401216</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9T14:05:59.378032290</meta:creation-date>
    <meta:generator>LibreOffice/24.2.7.2$Linux_X86_64 LibreOffice_project/420$Build-2</meta:generator>
    <dc:date>2026-06-09T16:31:21.635768627</dc:date>
    <meta:editing-duration>PT13M14S</meta:editing-duration>
    <meta:editing-cycles>3</meta:editing-cycles>
    <meta:document-statistic meta:table-count="2" meta:image-count="0" meta:object-count="0" meta:page-count="2" meta:paragraph-count="64" meta:word-count="405" meta:character-count="2444" meta:non-whitespace-character-count="2078"/>
  </office:meta>
</office:document-meta>
</file>