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20000029B38FF71C9.png" manifest:media-type="image/png"/>
  <manifest:file-entry manifest:full-path="Pictures/100000010000047B000002B0BED559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4b5c5" officeooo:paragraph-rsid="0014b5c5" style:font-weight-asian="bold" style:font-weight-complex="bold"/>
    </style:style>
    <style:style style:name="P2" style:family="paragraph" style:parent-style-name="Standard">
      <style:text-properties fo:font-weight="bold" officeooo:rsid="0015501a" officeooo:paragraph-rsid="0015501a" style:font-weight-asian="bold" style:font-weight-complex="bold"/>
    </style:style>
    <style:style style:name="P3" style:family="paragraph" style:parent-style-name="Standard">
      <style:text-properties fo:font-weight="bold" officeooo:rsid="0015af70" officeooo:paragraph-rsid="0015af70" style:font-weight-asian="bold" style:font-weight-complex="bold"/>
    </style:style>
    <style:style style:name="P4" style:family="paragraph" style:parent-style-name="Standard">
      <style:text-properties fo:font-weight="bold" officeooo:rsid="0018973a" officeooo:paragraph-rsid="0018973a" style:font-weight-asian="bold" style:font-weight-complex="bold"/>
    </style:style>
    <style:style style:name="P5" style:family="paragraph" style:parent-style-name="Standard">
      <style:text-properties fo:font-weight="bold" officeooo:rsid="0018973a" officeooo:paragraph-rsid="00196ab3" style:font-weight-asian="bold" style:font-weight-complex="bold"/>
    </style:style>
    <style:style style:name="P6" style:family="paragraph" style:parent-style-name="Standard">
      <style:text-properties fo:font-weight="normal" officeooo:rsid="0014b5c5" officeooo:paragraph-rsid="0014b5c5" style:font-weight-asian="normal" style:font-weight-complex="normal"/>
    </style:style>
    <style:style style:name="P7" style:family="paragraph" style:parent-style-name="Standard">
      <style:text-properties fo:font-weight="normal" officeooo:rsid="0015501a" officeooo:paragraph-rsid="0015501a" style:font-weight-asian="normal" style:font-weight-complex="normal"/>
    </style:style>
    <style:style style:name="P8" style:family="paragraph" style:parent-style-name="Standard">
      <style:text-properties fo:font-weight="normal" officeooo:rsid="0015af70" officeooo:paragraph-rsid="0015af70" style:font-weight-asian="normal" style:font-weight-complex="normal"/>
    </style:style>
    <style:style style:name="P9" style:family="paragraph" style:parent-style-name="Standard">
      <style:text-properties fo:font-weight="normal" officeooo:rsid="0016abf6" officeooo:paragraph-rsid="0016abf6" style:font-weight-asian="normal" style:font-weight-complex="normal"/>
    </style:style>
    <style:style style:name="P10" style:family="paragraph" style:parent-style-name="Standard">
      <style:text-properties fo:font-weight="normal" officeooo:rsid="0018973a" officeooo:paragraph-rsid="0018973a" style:font-weight-asian="normal" style:font-weight-complex="normal"/>
    </style:style>
    <style:style style:name="P11" style:family="paragraph" style:parent-style-name="Standard">
      <style:text-properties fo:font-weight="normal" officeooo:rsid="00196ab3" officeooo:paragraph-rsid="00196ab3" style:font-weight-asian="normal" style:font-weight-complex="normal"/>
    </style:style>
    <style:style style:name="P12" style:family="paragraph" style:parent-style-name="Standard">
      <style:text-properties fo:font-weight="normal" officeooo:rsid="00196ab3" officeooo:paragraph-rsid="001ba31f" style:font-weight-asian="normal" style:font-weight-complex="normal"/>
    </style:style>
    <style:style style:name="P13" style:family="paragraph" style:parent-style-name="Standard">
      <style:text-properties fo:font-weight="normal" officeooo:rsid="0019a57f" officeooo:paragraph-rsid="0019a57f"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96ab3"/>
    </style:style>
    <style:style style:name="T3" style:family="text">
      <style:text-properties officeooo:rsid="0019a5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text:p>
      <text:p text:style-name="P1">Question 1:</text:p>
      <text:p text:style-name="P6"/>
      <text:p text:style-name="P6">Output:</text:p>
      <text:p text:style-name="P6">n=128 reps=2 checksum=107389.290000</text:p>
      <text:p text:style-name="P6"/>
      <text:p text:style-name="P6">real<text:tab/>0m0.229s</text:p>
      <text:p text:style-name="P6">user<text:tab/>0m0.216s</text:p>
      <text:p text:style-name="P6">sys<text:tab/>0m0.013s</text:p>
      <text:p text:style-name="P6"/>
      <text:p text:style-name="P6"/>
      <text:p text:style-name="P6">Real seems to be the sum of user and sys times. Sys time is significantly shorter than user time.</text:p>
      <text:p text:style-name="P6"/>
      <text:p text:style-name="P2">Question 2:</text:p>
      <text:p text:style-name="P7">n=128 reps=2 checksum=107389.290000</text:p>
      <text:p text:style-name="P7">0.22</text:p>
      <text:p text:style-name="P7">n=128 reps=2 checksum=107389.290000</text:p>
      <text:p text:style-name="P7">0.22</text:p>
      <text:p text:style-name="P7">n=128 reps=2 checksum=107389.290000</text:p>
      <text:p text:style-name="P7">0.22</text:p>
      <text:p text:style-name="P7">n=128 reps=2 checksum=107389.290000</text:p>
      <text:p text:style-name="P7">0.23</text:p>
      <text:p text:style-name="P7">n=128 reps=2 checksum=107389.290000</text:p>
      <text:p text:style-name="P7">0.22</text:p>
      <text:p text:style-name="P7"/>
      <text:p text:style-name="P7">Time elapsed seems to be quite stable at 0.22. </text:p>
      <text:p text:style-name="P7"/>
      <text:p text:style-name="P7">I would report mean time, because it would contain information from all the runs, including both max and min times, which the two other metrics do not account for.</text:p>
      <text:p text:style-name="P7"/>
      <text:p text:style-name="P3">Question 3</text:p>
      <text:p text:style-name="P8">Output:</text:p>
      <text:p text:style-name="P8">n=128 reps=2 checksum=107389.290000</text:p>
      <text:p text:style-name="P8"/>
      <text:p text:style-name="P8"><text:s/>Performance counter stats for 'python3 matmul_slow.py':</text:p>
      <text:p text:style-name="P8"/>
      <text:p text:style-name="P8"><text:s text:c="9"/>796783128 <text:s text:c="5"/>cycles <text:s text:c="63"/></text:p>
      <text:p text:style-name="P8"><text:s text:c="8"/>2300307768 <text:s text:c="5"/>instructions <text:s text:c="20"/># <text:s text:c="3"/>2.89 <text:s/>insn per cycle <text:s text:c="11"/></text:p>
      <text:p text:style-name="P8"/>
      <text:p text:style-name="P8"><text:s text:c="7"/>0.224159868 seconds time elapsed</text:p>
      <text:p text:style-name="P8"/>
      <text:p text:style-name="P8"><text:s text:c="7"/>0.215265000 seconds user</text:p>
      <text:p text:style-name="P8"><text:s text:c="7"/>0.008047000 seconds sys</text:p>
      <text:p text:style-name="P8"/>
      <text:p text:style-name="P3">Question 4 &lt;&lt;&lt;&lt;&lt;&lt;&lt;&lt;&lt;&lt;&lt;&lt;&lt;&lt;&lt;&lt;&lt;&lt;&lt;&lt;&lt;&lt;&lt;&lt;&lt;&lt;&lt;&lt;&lt;&lt;&lt;&lt;&lt;&lt;&lt;&lt;&lt;&lt;&lt;&lt;&lt;</text:p>
      <text:p text:style-name="P8">n=128 reps=2 checksum=107389.290000</text:p>
      <text:p text:style-name="P8">n=128 reps=2 checksum=107389.290000</text:p>
      <text:p text:style-name="P8">n=128 reps=2 checksum=107389.290000</text:p>
      <text:p text:style-name="P8">n=128 reps=2 checksum=107389.290000</text:p>
      <text:p text:style-name="P8">n=128 reps=2 checksum=107389.290000</text:p>
      <text:p text:style-name="P8"/>
      <text:p text:style-name="P8"><text:s/>Performance counter stats for 'python3 matmul_slow.py' (5 runs):</text:p>
      <text:p text:style-name="P8"><text:soft-page-break/></text:p>
      <text:p text:style-name="P8"><text:s text:c="9"/>802482569 <text:s text:c="5"/>cycles <text:s text:c="65"/>( +- <text:s/>0.77% )</text:p>
      <text:p text:style-name="P8"><text:s text:c="8"/>2295997757 <text:s text:c="5"/>instructions <text:s text:c="20"/># <text:s text:c="3"/>2.86 <text:s/>insn per cycle <text:s text:c="13"/>( +- <text:s/>0.04% )</text:p>
      <text:p text:style-name="P8"><text:s text:c="12"/>551516 <text:s text:c="5"/>cache-misses <text:s text:c="59"/>( +- <text:s/>3.43% )</text:p>
      <text:p text:style-name="P8"/>
      <text:p text:style-name="P8"><text:s text:c="11"/>0.22472 +- 0.00200 seconds time elapsed <text:s/>( +- <text:s/>0.89% )</text:p>
      <text:p text:style-name="P8"/>
      <text:p text:style-name="P9">There are 2.86 instructions per cycle, which implies that 2.86 program instructions are done per computer tick. This implies that each instruction takes very little time to execute, and therefore that the program is really efficient.</text:p>
      <text:p text:style-name="P9"/>
      <text:p text:style-name="P9">The ratio of cache misses to instructions is roughly 2-3%. This means that caching is done very efficiently, and therefore that the system does not need to access main memory too often to retrieve information. This is important in reducing the computational cost incurred linked to such processes.</text:p>
      <text:p text:style-name="P9"/>
      <text:p text:style-name="P8"/>
      <text:p text:style-name="P3">Question 5</text:p>
      <text:p text:style-name="P8">Output:</text:p>
      <text:p text:style-name="P13"><draw:frame draw:style-name="fr1" draw:name="Image1" text:anchor-type="char" svg:width="6.6929in" svg:height="4.0146in" draw:z-index="0"><draw:image xlink:href="Pictures/100000010000047B000002B0BED559E4.png" xlink:type="simple" xlink:show="embed" xlink:actuate="onLoad" draw:mime-type="image/png"/></draw:frame>Of those which are not parent start frames, the function PyObject_CallMethodObjArgs seems to be quite computationally expensive. This is probably due to extensive object method use in the code.</text:p>
      <text:p text:style-name="P10"/>
      <text:p text:style-name="P4">Question 6</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Question <text:span text:style-name="T2">7</text:span></text:p>
      <text:p text:style-name="P11">Output of performance commands used for Q5:</text:p>
      <text:p text:style-name="P11"/>
      <text:p text:style-name="P12"><draw:frame draw:style-name="fr1" draw:name="Image2" text:anchor-type="char" svg:width="6.6929in" svg:height="4.1563in" draw:z-index="1"><draw:image xlink:href="Pictures/10000001000004320000029B38FF71C9.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0:03:24.137537048</meta:creation-date>
    <meta:generator>LibreOffice/24.2.7.2$Linux_X86_64 LibreOffice_project/420$Build-2</meta:generator>
    <dc:date>2026-06-08T11:02:19.306433689</dc:date>
    <meta:editing-duration>PT22M57S</meta:editing-duration>
    <meta:editing-cycles>5</meta:editing-cycles>
    <meta:document-statistic meta:table-count="0" meta:image-count="2" meta:object-count="0" meta:page-count="3" meta:paragraph-count="49" meta:word-count="310" meta:character-count="2499" meta:non-whitespace-character-count="1866"/>
  </office:meta>
</office:document-meta>
</file>